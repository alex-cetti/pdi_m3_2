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528000002BCA9A8B63E.png" manifest:media-type="image/png"/>
  <manifest:file-entry manifest:full-path="Pictures/1000000000000528000002BCBE3F55BE.png" manifest:media-type="image/png"/>
  <manifest:file-entry manifest:full-path="Pictures/1000000000000528000002BCD1C4A0FF.png" manifest:media-type="image/png"/>
  <manifest:file-entry manifest:full-path="Pictures/1000000000000528000002BCCE1F25F5.png" manifest:media-type="image/png"/>
  <manifest:file-entry manifest:full-path="Pictures/1000000000000528000002BCDD1E726E.png" manifest:media-type="image/png"/>
  <manifest:file-entry manifest:full-path="Pictures/1000000000000528000002BCCCF732E6.png" manifest:media-type="image/png"/>
  <manifest:file-entry manifest:full-path="Pictures/1000000000000528000002BC5E47584B.png" manifest:media-type="image/png"/>
  <manifest:file-entry manifest:full-path="Pictures/1000000000000528000002BCB84DC44C.png" manifest:media-type="image/png"/>
  <manifest:file-entry manifest:full-path="Pictures/1000000000000531000002BCE6CED4A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9f27" officeooo:paragraph-rsid="00089f27"/>
    </style:style>
    <style:style style:name="P2" style:family="paragraph" style:parent-style-name="Standard">
      <style:paragraph-properties fo:break-before="page"/>
      <style:text-properties officeooo:rsid="00089f27" officeooo:paragraph-rsid="00089f27"/>
    </style:style>
    <style:style style:name="P3" style:family="paragraph" style:parent-style-name="Standard">
      <style:text-properties officeooo:rsid="000a5632" officeooo:paragraph-rsid="000a5632"/>
    </style:style>
    <style:style style:name="P4" style:family="paragraph" style:parent-style-name="Standard">
      <style:text-properties officeooo:rsid="000bcea0" officeooo:paragraph-rsid="000bcea0"/>
    </style:style>
    <style:style style:name="P5" style:family="paragraph" style:parent-style-name="Standard">
      <style:text-properties officeooo:rsid="000bcea0" officeooo:paragraph-rsid="000bcea0"/>
    </style:style>
    <style:style style:name="P6" style:family="paragraph" style:parent-style-name="Standard">
      <style:text-properties officeooo:rsid="000e65be" officeooo:paragraph-rsid="000e65b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LOTS POR QUANTIDADE DE AMOSTRAS</text:p>
      <text:p text:style-name="P1"/>
      <text:p text:style-name="P1">5.000</text:p>
      <text:p text:style-name="P1">m1</text:p>
      <text:p text:style-name="P1"><draw:frame draw:style-name="fr1" draw:name="Image1" text:anchor-type="char" svg:width="5.7535in" svg:height="3.0299in" draw:z-index="0"><draw:image xlink:href="Pictures/1000000000000531000002BCE6CED4A0.png" xlink:type="simple" xlink:show="embed" xlink:actuate="onLoad" draw:mime-type="image/png"/></draw:frame>m2</text:p>
      <text:p text:style-name="P1"><draw:frame draw:style-name="fr1" draw:name="Image2" text:anchor-type="char" svg:width="5.4602in" svg:height="2.8957in" draw:z-index="1"><draw:image xlink:href="Pictures/1000000000000528000002BC5E47584B.png" xlink:type="simple" xlink:show="embed" xlink:actuate="onLoad" draw:mime-type="image/png"/></draw:frame>m3</text:p>
      <text:p text:style-name="P1"><draw:frame draw:style-name="fr3" draw:name="Image3" text:anchor-type="char" svg:x="0.5791in" svg:y="0.1744in" svg:width="5.2429in" svg:height="2.7807in" draw:z-index="2"><draw:image xlink:href="Pictures/1000000000000528000002BCCCF732E6.png" xlink:type="simple" xlink:show="embed" xlink:actuate="onLoad" draw:mime-type="image/png"/></draw:frame></text:p>
      <text:p text:style-name="P2">15.000</text:p>
      <text:p text:style-name="P3">m1</text:p>
      <text:p text:style-name="P3"><draw:frame draw:style-name="fr2" draw:name="Image5" text:anchor-type="char" svg:width="5.1272in" svg:height="2.7193in" draw:z-index="4"><draw:image xlink:href="Pictures/1000000000000528000002BCDD1E726E.png" xlink:type="simple" xlink:show="embed" xlink:actuate="onLoad" draw:mime-type="image/png"/></draw:frame></text:p>
      <text:p text:style-name="P3">m2</text:p>
      <text:p text:style-name="P3"><draw:frame draw:style-name="fr2" draw:name="Image4" text:anchor-type="char" svg:width="5.2327in" svg:height="2.7752in" draw:z-index="3"><draw:image xlink:href="Pictures/1000000000000528000002BCCE1F25F5.png" xlink:type="simple" xlink:show="embed" xlink:actuate="onLoad" draw:mime-type="image/png"/></draw:frame></text:p>
      <text:p text:style-name="P3">m3<draw:frame draw:style-name="fr1" draw:name="Image6" text:anchor-type="char" svg:width="4.8602in" svg:height="2.578in" draw:z-index="5"><draw:image xlink:href="Pictures/1000000000000528000002BCD1C4A0FF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25.000</text:p>
      <text:p text:style-name="P4">m1</text:p>
      <text:p text:style-name="P4"><draw:frame draw:style-name="fr2" draw:name="Image7" text:anchor-type="char" svg:width="5.3264in" svg:height="2.8244in" draw:z-index="6"><draw:image xlink:href="Pictures/1000000000000528000002BCBE3F55BE.png" xlink:type="simple" xlink:show="embed" xlink:actuate="onLoad" draw:mime-type="image/png"/></draw:frame></text:p>
      <text:p text:style-name="P4">m2</text:p>
      <text:p text:style-name="P4"><draw:frame draw:style-name="fr2" draw:name="Image8" text:anchor-type="char" svg:width="5.4929in" svg:height="2.9134in" draw:z-index="7"><draw:image xlink:href="Pictures/1000000000000528000002BCB84DC44C.png" xlink:type="simple" xlink:show="embed" xlink:actuate="onLoad" draw:mime-type="image/png"/></draw:frame></text:p>
      <text:p text:style-name="P4">m3</text:p>
      <text:p text:style-name="P6"><draw:frame draw:style-name="fr1" draw:name="Image9" text:anchor-type="char" svg:width="5.1217in" svg:height="2.7161in" draw:z-index="8"><draw:image xlink:href="Pictures/1000000000000528000002BCA9A8B63E.png" xlink:type="simple" xlink:show="embed" xlink:actuate="onLoad" draw:mime-type="image/png"/></draw:frame>s</text:p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>modelo ia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7-05T16:19:49.024056679</meta:creation-date>
    <meta:editing-duration>PT2M33S</meta:editing-duration>
    <meta:editing-cycles>2</meta:editing-cycles>
    <meta:generator>LibreOffice/24.2.7.2$Linux_X86_64 LibreOffice_project/420$Build-2</meta:generator>
    <dc:date>2026-07-05T16:22:19.418070153</dc:date>
    <meta:document-statistic meta:table-count="0" meta:image-count="9" meta:object-count="0" meta:page-count="4" meta:paragraph-count="15" meta:word-count="20" meta:character-count="77" meta:non-whitespace-character-count="72"/>
  </office:meta>
</office:document-meta>
</file>